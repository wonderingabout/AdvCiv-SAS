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5cm"/>
    </style:style>
    <style:style style:name="co2" style:family="table-column">
      <style:table-column-properties fo:break-before="auto" style:column-width="3.9cm"/>
    </style:style>
    <style:style style:name="co3" style:family="table-column">
      <style:table-column-properties fo:break-before="auto" style:column-width="3.799cm"/>
    </style:style>
    <style:style style:name="co4" style:family="table-column">
      <style:table-column-properties fo:break-before="auto" style:column-width="2.258cm"/>
    </style:style>
    <style:style style:name="ro1" style:family="table-row">
      <style:table-row-properties style:row-height="0.64cm" fo:break-before="auto" style:use-optimal-row-height="false"/>
    </style:style>
    <style:style style:name="ro2" style:family="table-row">
      <style:table-row-properties style:row-height="4.251cm" fo:break-before="auto" style:use-optimal-row-height="false"/>
    </style:style>
    <style:style style:name="ro3" style:family="table-row">
      <style:table-row-properties style:row-height="7.091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3.387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size="12pt" style:font-size-asian="12pt" style:font-size-complex="12pt"/>
    </style:style>
    <style:style style:name="ce7" style:family="table-cell" style:parent-style-name="Default">
      <style:text-properties fo:font-size="12pt" style:font-size-asian="12pt" style:font-size-complex="12pt"/>
    </style:style>
    <style:style style:name="ce8" style:family="table-cell" style:parent-style-name="Default">
      <style:table-cell-properties style:text-align-source="fix" style:repeat-content="false" fo:wrap-option="wrap" style:vertical-align="middle"/>
      <style:paragraph-properties fo:text-align="start" fo:margin-left="0cm"/>
      <style:text-properties fo:font-size="12pt" style:font-size-asian="12pt" style:font-size-complex="12pt"/>
    </style:style>
    <style:style style:name="ce4" style:family="table-cell" style:parent-style-name="Default">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fo:border="0.74pt solid #000000" style:vertical-align="middle"/>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2" table:number-columns-repeated="9" table:default-cell-style-name="ce4"/>
        <table:table-column table:style-name="co3" table:number-columns-repeated="2" table:default-cell-style-name="ce7"/>
        <table:table-column table:style-name="co4" table:number-columns-repeated="16372" table:default-cell-style-name="ce7"/>
        <table:table-row table:style-name="ro1">
          <table:table-cell office:value-type="string" calcext:value-type="string">
            <text:p>Difficulty</text:p>
          </table:table-cell>
          <table:table-cell table:style-name="ce1" office:value-type="string" calcext:value-type="string">
            <text:p>Settler</text:p>
          </table:table-cell>
          <table:table-cell table:style-name="ce1" office:value-type="string" calcext:value-type="string">
            <text:p>Chieftain</text:p>
          </table:table-cell>
          <table:table-cell table:style-name="ce1" office:value-type="string" calcext:value-type="string">
            <text:p>Warlord</text:p>
          </table:table-cell>
          <table:table-cell table:style-name="ce1" office:value-type="string" calcext:value-type="string">
            <text:p>Noble</text:p>
          </table:table-cell>
          <table:table-cell table:style-name="ce1" office:value-type="string" calcext:value-type="string">
            <text:p>Prince</text:p>
          </table:table-cell>
          <table:table-cell table:style-name="ce1" office:value-type="string" calcext:value-type="string">
            <text:p>Monarch</text:p>
          </table:table-cell>
          <table:table-cell table:style-name="ce1" office:value-type="string" calcext:value-type="string">
            <text:p>Emperor</text:p>
          </table:table-cell>
          <table:table-cell table:style-name="ce1" office:value-type="string" calcext:value-type="string">
            <text:p>Immortal</text:p>
          </table:table-cell>
          <table:table-cell table:style-name="ce1" office:value-type="string" calcext:value-type="string">
            <text:p>Deity</text:p>
          </table:table-cell>
          <table:table-cell table:number-columns-repeated="16374"/>
        </table:table-row>
        <table:table-row table:style-name="ro1">
          <table:table-cell office:value-type="string" calcext:value-type="string">
            <text:p>Free Explore Units</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16374"/>
        </table:table-row>
        <table:table-row table:style-name="ro1">
          <table:table-cell office:value-type="string" calcext:value-type="string">
            <text:p>Free AI Explore Units</text:p>
          </table:table-cell>
          <table:table-cell table:number-columns-repeated="4" office:value-type="float" office:value="0" calcext:value-type="float">
            <text:p>0</text:p>
          </table:table-cell>
          <table:table-cell table:number-columns-repeated="5" office:value-type="float" office:value="1" calcext:value-type="float">
            <text:p>1</text:p>
          </table:table-cell>
          <table:table-cell table:number-columns-repeated="16374"/>
        </table:table-row>
        <table:table-row table:style-name="ro1">
          <table:table-cell office:value-type="string" calcext:value-type="string">
            <text:p>Free Workers</text:p>
          </table:table-cell>
          <table:table-cell table:number-columns-repeated="9" office:value-type="float" office:value="0" calcext:value-type="float">
            <text:p>0</text:p>
          </table:table-cell>
          <table:table-cell table:number-columns-repeated="16374"/>
        </table:table-row>
        <table:table-row table:style-name="ro1">
          <table:table-cell office:value-type="string" calcext:value-type="string">
            <text:p>Free AI Workers</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6374"/>
        </table:table-row>
        <table:table-row table:style-name="ro1">
          <table:table-cell office:value-type="string" calcext:value-type="string">
            <text:p>Free Defense Units</text:p>
          </table:table-cell>
          <table:table-cell table:number-columns-repeated="9" office:value-type="float" office:value="0" calcext:value-type="float">
            <text:p>0</text:p>
          </table:table-cell>
          <table:table-cell table:number-columns-repeated="16374"/>
        </table:table-row>
        <table:table-row table:style-name="ro1">
          <table:table-cell office:value-type="string" calcext:value-type="string">
            <text:p>Free AI Defense Units</text:p>
          </table:table-cell>
          <table:table-cell table:number-columns-repeated="3" office:value-type="float" office:value="0" calcext:value-type="float">
            <text:p>0</text:p>
          </table:table-cell>
          <table:table-cell table:number-columns-repeated="2"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table:number-columns-repeated="16374"/>
        </table:table-row>
        <table:table-row table:style-name="ro1">
          <table:table-cell office:value-type="string" calcext:value-type="string">
            <text:p>iResearch% </text:p>
          </table:table-cell>
          <table:table-cell office:value-type="float" office:value="68" calcext:value-type="float">
            <text:p>68</text:p>
          </table:table-cell>
          <table:table-cell office:value-type="float" office:value="73" calcext:value-type="float">
            <text:p>73</text:p>
          </table:table-cell>
          <table:table-cell office:value-type="float" office:value="85" calcext:value-type="float">
            <text:p>85</text:p>
          </table:table-cell>
          <table:table-cell office:value-type="string" calcext:value-type="string">
            <text:p>95*</text:p>
          </table:table-cell>
          <table:table-cell office:value-type="float" office:value="114" calcext:value-type="float">
            <text:p>114</text:p>
          </table:table-cell>
          <table:table-cell office:value-type="float" office:value="120" calcext:value-type="float">
            <text:p>120</text:p>
          </table:table-cell>
          <table:table-cell office:value-type="float" office:value="128" calcext:value-type="float">
            <text:p>128</text:p>
          </table:table-cell>
          <table:table-cell office:value-type="float" office:value="133" calcext:value-type="float">
            <text:p>133</text:p>
          </table:table-cell>
          <table:table-cell office:value-type="float" office:value="140" calcext:value-type="float">
            <text:p>140</text:p>
          </table:table-cell>
          <table:table-cell table:number-columns-repeated="16374"/>
        </table:table-row>
        <table:table-row table:style-name="ro1">
          <table:table-cell office:value-type="string" calcext:value-type="string">
            <text:p>AIResearch %</text:p>
          </table:table-cell>
          <table:table-cell office:value-type="float" office:value="95" calcext:value-type="float">
            <text:p>95</text:p>
          </table:table-cell>
          <table:table-cell table:number-columns-repeated="3" office:value-type="float" office:value="100" calcext:value-type="float">
            <text:p>100</text:p>
          </table:table-cell>
          <table:table-cell office:value-type="float" office:value="108" calcext:value-type="float">
            <text:p>108</text:p>
          </table:table-cell>
          <table:table-cell office:value-type="float" office:value="112" calcext:value-type="float">
            <text:p>112</text:p>
          </table:table-cell>
          <table:table-cell office:value-type="float" office:value="116" calcext:value-type="float">
            <text:p>116</text:p>
          </table:table-cell>
          <table:table-cell office:value-type="float" office:value="120" calcext:value-type="float">
            <text:p>120</text:p>
          </table:table-cell>
          <table:table-cell office:value-type="float" office:value="124" calcext:value-type="float">
            <text:p>124</text:p>
          </table:table-cell>
          <table:table-cell table:number-columns-repeated="16374"/>
        </table:table-row>
        <table:table-row table:style-name="ro2">
          <table:table-cell office:value-type="string" calcext:value-type="string">
            <text:p>FreeTechs</text:p>
          </table:table-cell>
          <table:table-cell table:style-name="ce5" office:value-type="string" calcext:value-type="string">
            <text:p>The Wheel</text:p>
            <text:p>Agriculture</text:p>
            <text:p>Hunting</text:p>
            <text:p>Mining</text:p>
            <text:p>Pottery</text:p>
            <text:p>Animal Husbandry</text:p>
            <text:p>Bronze Working</text:p>
            <text:p>Iron Working</text:p>
          </table:table-cell>
          <table:table-cell table:number-columns-repeated="8" table:style-name="ce12" office:value-type="string" calcext:value-type="string">
            <text:p>-</text:p>
          </table:table-cell>
          <table:table-cell table:number-columns-repeated="16374"/>
        </table:table-row>
        <table:table-row table:style-name="ro3">
          <table:table-cell office:value-type="string" calcext:value-type="string">
            <text:p>AIFreeTechs</text:p>
          </table:table-cell>
          <table:table-cell table:style-name="ce5" office:value-type="string" calcext:value-type="string">
            <text:p>-</text:p>
            <text:p>-</text:p>
            <text:p>Pottery</text:p>
            <text:p>-</text:p>
            <text:p><text:span text:style-name="T1">Bronze Working</text:span></text:p>
            <text:p>Currency</text:p>
            <text:p><text:span text:style-name="T1">-</text:span></text:p>
            <text:p>Compass</text:p>
            <text:p>-</text:p>
            <text:p>-</text:p>
            <text:p>Chemistry</text:p>
            <text:p>-</text:p>
            <text:p>-</text:p>
            <text:p>Laser</text:p>
          </table:table-cell>
          <table:table-cell table:style-name="ce5" office:value-type="string" calcext:value-type="string">
            <text:p>-</text:p>
            <text:p>-</text:p>
            <text:p>Pottery</text:p>
            <text:p>-</text:p>
            <text:p><text:span text:style-name="T1">Bronze Working</text:span></text:p>
            <text:p>Currency</text:p>
            <text:p><text:span text:style-name="T1">-</text:span></text:p>
            <text:p>Compass</text:p>
            <text:p>-</text:p>
            <text:p>-</text:p>
            <text:p>Chemistry</text:p>
            <text:p>-</text:p>
            <text:p>-</text:p>
            <text:p>Laser</text:p>
          </table:table-cell>
          <table:table-cell table:style-name="ce5" office:value-type="string" calcext:value-type="string">
            <text:p>-</text:p>
            <text:p>-</text:p>
            <text:p>Pottery</text:p>
            <text:p>-</text:p>
            <text:p><text:span text:style-name="T1">Bronze Working</text:span></text:p>
            <text:p>Currency</text:p>
            <text:p><text:span text:style-name="T1">-</text:span></text:p>
            <text:p>Compass</text:p>
            <text:p>-</text:p>
            <text:p>-</text:p>
            <text:p>Chemistry</text:p>
            <text:p>-</text:p>
            <text:p>-</text:p>
            <text:p>Laser</text:p>
          </table:table-cell>
          <table:table-cell table:style-name="ce5" office:value-type="string" calcext:value-type="string">
            <text:p>-</text:p>
            <text:p>-</text:p>
            <text:p>Pottery</text:p>
            <text:p>-</text:p>
            <text:p><text:span text:style-name="T1">Bronze Working</text:span></text:p>
            <text:p>Currency</text:p>
            <text:p><text:span text:style-name="T1">Monarchy</text:span></text:p>
            <text:p>Compass</text:p>
            <text:p>-</text:p>
            <text:p>-</text:p>
            <text:p>Chemistry</text:p>
            <text:p>-</text:p>
            <text:p>-</text:p>
            <text:p>Laser</text:p>
          </table:table-cell>
          <table:table-cell table:style-name="ce5" office:value-type="string" calcext:value-type="string">
            <text:p>-</text:p>
            <text:p>-</text:p>
            <text:p>Pottery</text:p>
            <text:p>-</text:p>
            <text:p>Bronze Working</text:p>
            <text:p>Currency</text:p>
            <text:p>Monarchy</text:p>
            <text:p>Compass</text:p>
            <text:p>-</text:p>
            <text:p>-</text:p>
            <text:p>Chemistry</text:p>
            <text:p>-</text:p>
            <text:p>-</text:p>
            <text:p>Laser</text:p>
          </table:table-cell>
          <table:table-cell table:style-name="ce5" office:value-type="string" calcext:value-type="string">
            <text:p>-</text:p>
            <text:p>-</text:p>
            <text:p>Pottery</text:p>
            <text:p>-</text:p>
            <text:p>Bronze Working</text:p>
            <text:p>Currency</text:p>
            <text:p>Monarchy</text:p>
            <text:p>Compass</text:p>
            <text:p>Drama</text:p>
            <text:p>-</text:p>
            <text:p>Chemistry</text:p>
            <text:p>Industrialism</text:p>
            <text:p>-</text:p>
            <text:p>Laser</text:p>
          </table:table-cell>
          <table:table-cell table:style-name="ce5" office:value-type="string" calcext:value-type="string">
            <text:p>Fishing</text:p>
            <text:p>-</text:p>
            <text:p>Pottery</text:p>
            <text:p>-</text:p>
            <text:p>Bronze Working</text:p>
            <text:p>Currency</text:p>
            <text:p>Monarchy</text:p>
            <text:p>Compass</text:p>
            <text:p>Drama</text:p>
            <text:p>-</text:p>
            <text:p>Chemistry</text:p>
            <text:p>Industrialism</text:p>
            <text:p>-</text:p>
            <text:p>Laser</text:p>
          </table:table-cell>
          <table:table-cell table:style-name="ce5" office:value-type="string" calcext:value-type="string">
            <text:p>Fishing</text:p>
            <text:p>-</text:p>
            <text:p>Pottery</text:p>
            <text:p>Animal Husbandry</text:p>
            <text:p>Bronze Working</text:p>
            <text:p>Currency</text:p>
            <text:p>Monarchy</text:p>
            <text:p>Compass</text:p>
            <text:p>Drama</text:p>
            <text:p>-</text:p>
            <text:p>Chemistry</text:p>
            <text:p>Industrialism</text:p>
            <text:p>-</text:p>
            <text:p>Laser</text:p>
          </table:table-cell>
          <table:table-cell table:style-name="ce5" office:value-type="string" calcext:value-type="string">
            <text:p>Fishing</text:p>
            <text:p>Mysticism</text:p>
            <text:p>Pottery</text:p>
            <text:p>Animal Husbandry</text:p>
            <text:p>Bronze Working</text:p>
            <text:p>Currency</text:p>
            <text:p>Monarchy</text:p>
            <text:p>Compass</text:p>
            <text:p>Drama</text:p>
            <text:p>Optics</text:p>
            <text:p>Chemistry</text:p>
            <text:p>Industrialism</text:p>
            <text:p>Biology</text:p>
            <text:p>Laser</text:p>
          </table:table-cell>
          <table:table-cell table:number-columns-repeated="16374"/>
        </table:table-row>
        <table:table-row table:style-name="ro4">
          <table:table-cell table:style-name="ce7"/>
          <table:table-cell table:style-name="Default"/>
          <table:table-cell table:style-name="ce7" table:number-columns-repeated="8"/>
          <table:table-cell table:number-columns-repeated="16374"/>
        </table:table-row>
        <table:table-row table:style-name="ro5">
          <table:table-cell table:style-name="ce8" office:value-type="string" calcext:value-type="string" table:number-columns-spanned="10" table:number-rows-spanned="1">
            <text:p>* : as was already explained in the existing advciv code before mine: &lt;!-- advc.251: Was 100. Note that this doesn't mean that humans have an advantage over the AI; ResearchPercent on Noble applies to all civs. --&gt; <text:s/></text:p>
          </table:table-cell>
          <table:covered-table-cell table:style-name="ce11"/>
          <table:covered-table-cell table:number-columns-repeated="8" table:style-name="ce13"/>
          <table:table-cell table:number-columns-repeated="16374"/>
        </table:table-row>
        <table:table-row table:style-name="ro6">
          <table:table-cell table:style-name="ce8" office:value-type="string" calcext:value-type="string" table:number-columns-spanned="10" table:number-rows-spanned="1">
            <text:p>** : these defenders should much more often be warriors than archers, Ais don’t start with hunting at any difficulty now which further delays the time where first archers are acquired. As archer-type of units are more enforced to be strictly defenders now, it may make the AI more versatile and efficient at its early game if it starts with more warriors that are sooner upgraded (and sooner <text:s/>Available) into axemen-spearmen, which can then be upgraded into macemen and such similar types of units. The purpose of this is to also make the AI stronger and more responsive in the early game, being more able to do rushes. Since archers should strictly never rush anymore now, it gives extra capacity for melee types of units to do so instead (but AI may also build chariots or similar types of units to assist the rushes or wars) Increasing this number may also help the AI’s cities not be as often destroyed to early barbarian raids, which happens a bit too often Note : warriors now also have the CITY_DEFENSE role, so they may also replace archers at that role, at least in theory maybe.</text:p>
          </table:table-cell>
          <table:covered-table-cell table:style-name="ce11"/>
          <table:covered-table-cell table:number-columns-repeated="8" table:style-name="ce13"/>
          <table:table-cell table:number-columns-repeated="1637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 style:data-style-name="N2" text:time-value="20:47:41.47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8:35:10.194000000</meta:creation-date>
    <dc:date>2025-03-23T21:53:22.682000000</dc:date>
    <meta:editing-duration>PT1H50M52S</meta:editing-duration>
    <meta:editing-cycles>28</meta:editing-cycles>
    <meta:generator>LibreOffice/24.2.4.2$Windows_X86_64 LibreOffice_project/51a6219feb6075d9a4c46691dcfe0cd9c4fff3c2</meta:generator>
    <meta:print-date>2025-03-23T21:36:39.398000000</meta:print-date>
    <meta:printed-by>Fichiers PDF</meta:printed-by>
    <meta:document-statistic meta:table-count="1" meta:cell-count="112" meta:object-count="0"/>
  </office:meta>
</office:document-meta>
</file>